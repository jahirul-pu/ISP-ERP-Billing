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1e17ca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201f15"/>
    </style:style>
    <style:style style:name="P3" style:family="paragraph" style:parent-style-name="Standard">
      <style:paragraph-properties fo:text-align="left" style:justify-single-word="false"/>
      <style:text-properties officeooo:paragraph-rsid="001fc2ec"/>
    </style:style>
    <style:style style:name="P4" style:family="paragraph" style:parent-style-name="Standard">
      <style:paragraph-properties fo:text-align="left" style:justify-single-word="false"/>
      <style:text-properties officeooo:paragraph-rsid="00201f15"/>
    </style:style>
    <style:style style:name="P5" style:family="paragraph" style:parent-style-name="Standard">
      <style:paragraph-properties fo:text-align="left" style:justify-single-word="false"/>
      <style:text-properties fo:font-size="16pt" fo:font-weight="bold" officeooo:paragraph-rsid="00201f15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c2ec"/>
    </style:style>
    <style:style style:name="T4" style:family="text">
      <style:text-properties fo:font-size="16pt" fo:font-weight="bold" officeooo:rsid="00201f15" style:font-size-asian="16pt" style:font-weight-asian="bold" style:font-size-complex="16pt" style:font-weight-complex="bold"/>
    </style:style>
    <style:style style:name="T5" style:family="text">
      <style:text-properties officeooo:rsid="00201f15"/>
    </style:style>
    <style:style style:name="T6" style:family="text">
      <style:text-properties fo:font-weight="bold" officeooo:rsid="00201f1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P ERP &amp; Financial Management System PRD</text:p>
      <text:p text:style-name="P2"><text:line-break/><text:line-break/><text:span text:style-name="T1">1. Product Overview</text:span><text:line-break/><text:tab/>Develop a web-based ISP ERP and financial management platform with MikroTik integration <text:tab/>focused primarily on:<text:line-break/> <text:tab/><text:tab/>customer financial management<text:line-break/><text:tab/><text:tab/>billing operations<text:line-break/><text:tab/><text:tab/>collections<text:line-break/><text:tab/><text:tab/>accounting<text:line-break/> <text:tab/><text:tab/>operational analytics<text:line-break/><text:tab/><text:tab/>staff management<text:line-break/><text:tab/><text:tab/>area-based ISP operations<text:line-break/><text:tab/>The platform will use MikroTik as a read-only operational/network data source while all <text:tab/>financial and administrative logic remains controlled by the ERP system.<text:line-break/><text:line-break/><text:span text:style-name="T1">2. Product Vision</text:span><text:line-break/><text:tab/> Create a centralized operational intelligence platform for ISP businesses that combines:<text:line-break/><text:tab/><text:tab/> customer management<text:line-break/><text:tab/><text:tab/> billing automation<text:line-break/><text:tab/><text:tab/> accounting<text:line-break/><text:tab/><text:tab/> collections<text:line-break/><text:tab/><text:tab/> HR/payroll<text:line-break/> <text:tab/><text:tab/>expense management<text:line-break/><text:tab/><text:tab/> operational analytics<text:line-break/> <text:tab/><text:tab/>area management<text:line-break/><text:tab/><text:tab/> revenue intelligence<text:line-break/><text:tab/> into a unified system.<text:line-break/><text:span text:style-name="T1">3. Core Philosophy:</text:span><text:line-break/><text:tab/> MikroTik Integration Policy<text:line-break/> <text:tab/><text:tab/>MikroTik will ONLY provide:<text:line-break/><text:tab/><text:tab/><text:tab/> PPPoE customer package/profile<text:line-break/> <text:tab/><text:tab/><text:tab/>active/inactive status<text:line-break/><text:tab/><text:tab/><text:tab/> uptime/session data<text:line-break/><text:tab/><text:tab/><text:tab/> bandwidth package information<text:line-break/><text:tab/><text:tab/><text:tab/> IP/MAC data<text:line-break/><text:tab/><text:tab/><text:tab/> online/offline status<text:line-break/> <text:tab/><text:tab/><text:tab/>ERP System will manage:<text:line-break/><text:tab/><text:tab/><text:tab/> billing<text:line-break/><text:tab/><text:tab/><text:tab/> pricing<text:line-break/><text:tab/><text:tab/><text:tab/> customer finance<text:line-break/><text:tab/><text:tab/><text:tab/> accounting<text:line-break/><text:tab/><text:tab/><text:tab/> salaries<text:line-break/><text:tab/><text:tab/><text:tab/> expenses<text:line-break/><text:tab/><text:tab/><text:tab/>reports<text:line-break/><text:tab/><text:tab/><text:tab/>collections<text:line-break/><text:tab/><text:tab/><text:tab/>operational workflow<text:line-break/><text:tab/>The ERP must NOT:<text:line-break/><text:soft-page-break/><text:tab/><text:tab/><text:tab/>modify MikroTik router settings<text:line-break/><text:tab/><text:tab/><text:tab/>disconnect customers automatically (initially)<text:line-break/><text:tab/><text:tab/><text:tab/>edit firewall rules<text:line-break/><text:tab/><text:tab/><text:tab/>modify queues directly<text:line-break/><text:span text:style-name="T1">4. User Roles</text:span><text:line-break/><text:tab/>Super Admin:<text:line-break/><text:tab/><text:tab/>Full access to all modules.<text:line-break/><text:tab/>Finance Admin:<text:line-break/><text:tab/><text:tab/>Access:<text:line-break/><text:tab/><text:tab/><text:tab/>billing<text:line-break/><text:tab/><text:tab/><text:tab/>revenue<text:line-break/><text:tab/><text:tab/><text:tab/>accounting<text:line-break/><text:tab/><text:tab/><text:tab/>expenses<text:line-break/><text:tab/><text:tab/><text:tab/>salaries<text:line-break/><text:tab/><text:tab/><text:tab/>reports<text:line-break/><text:line-break/><text:tab/><text:tab/>Restrictions:<text:line-break/><text:tab/><text:tab/><text:tab/>cannot modify system settings<text:line-break/><text:tab/>Area Manager:<text:line-break/><text:tab/><text:tab/>Access:<text:line-break/><text:tab/><text:tab/><text:tab/>customers in assigned areas<text:line-break/><text:tab/><text:tab/><text:tab/>area revenue<text:line-break/><text:tab/><text:tab/><text:tab/>complaints<text:line-break/><text:tab/><text:tab/><text:tab/>collectors<text:line-break/><text:tab/><text:tab/><text:tab/>technicians<text:line-break/><text:tab/>Bill Collector:<text:line-break/><text:tab/><text:tab/>Access:<text:line-break/><text:tab/><text:tab/><text:tab/>assigned customers<text:line-break/><text:tab/><text:tab/><text:tab/>collection entry<text:line-break/><text:tab/><text:tab/><text:tab/>due list<text:line-break/><text:tab/><text:tab/><text:tab/>collection reports<text:line-break/><text:line-break/><text:tab/><text:tab/>Restrictions:<text:line-break/><text:tab/><text:tab/><text:tab/>cannot edit bills<text:line-break/><text:tab/><text:tab/><text:tab/>cannot delete payments<text:line-break/><text:tab/>Technician:<text:line-break/><text:tab/><text:tab/>Access:<text:line-break/><text:tab/><text:tab/><text:tab/>assigned complaints<text:line-break/><text:tab/><text:tab/><text:tab/>customer network info<text:line-break/><text:tab/><text:tab/><text:tab/>status updates<text:line-break/><text:tab/>Support Agent:<text:line-break/><text:tab/><text:tab/>Access:<text:line-break/><text:tab/><text:tab/><text:tab/>customer lookup<text:line-break/><text:tab/><text:tab/><text:tab/>complaint entry<text:line-break/><text:tab/><text:tab/><text:tab/>ticket updates<text:line-break/><text:tab/>Auditor (Read-only):<text:line-break/><text:tab/><text:tab/>Access to:<text:line-break/><text:tab/><text:tab/><text:tab/>financial reports<text:line-break/><text:soft-page-break/><text:tab/><text:tab/><text:tab/>transaction logs<text:line-break/><text:tab/><text:tab/><text:tab/>audit history<text:line-break/><text:line-break/><text:tab/><text:tab/>No edit permissions.<text:line-break/><text:line-break/><text:span text:style-name="T1">5. Main Modules:</text:span><text:line-break/><text:tab/><text:span text:style-name="T2">MODULE 1 — Customer Management</text:span><text:line-break/><text:tab/><text:tab/>Features:<text:line-break/><text:tab/><text:tab/><text:tab/>Customer Profiles:<text:line-break/><text:tab/><text:tab/><text:tab/><text:tab/>Store:<text:line-break/><text:tab/><text:tab/><text:tab/><text:tab/><text:tab/>customer ID<text:line-break/><text:tab/><text:tab/><text:tab/><text:tab/><text:tab/>name<text:line-break/><text:tab/><text:tab/><text:tab/><text:tab/><text:tab/>phone numbers<text:line-break/><text:tab/><text:tab/><text:tab/><text:tab/><text:tab/>alternate contact<text:line-break/><text:tab/><text:tab/><text:tab/><text:tab/><text:tab/>address<text:line-break/><text:tab/><text:tab/><text:tab/><text:tab/><text:tab/>GPS/location<text:line-break/><text:tab/><text:tab/><text:tab/><text:tab/><text:tab/>NID/business info<text:line-break/><text:tab/><text:tab/><text:tab/><text:tab/><text:tab/>join date<text:line-break/><text:tab/><text:tab/><text:tab/><text:tab/><text:tab/>customer type<text:line-break/><text:tab/><text:tab/><text:tab/><text:tab/>Customer Types:<text:line-break/><text:tab/><text:tab/><text:tab/><text:tab/><text:tab/>Home<text:line-break/><text:tab/><text:tab/><text:tab/><text:tab/><text:tab/>Corporate<text:line-break/><text:tab/><text:tab/><text:tab/><text:tab/><text:tab/>Shared<text:line-break/><text:tab/><text:tab/><text:tab/><text:tab/><text:tab/>VIP<text:line-break/><text:tab/><text:tab/><text:tab/><text:tab/><text:tab/>Temporary<text:line-break/><text:tab/><text:tab/><text:tab/><text:tab/><text:tab/>Franchise<text:line-break/><text:tab/><text:tab/>Area Assignment:<text:line-break/><text:tab/><text:tab/><text:tab/>Each customer must belong to:<text:line-break/><text:tab/><text:tab/><text:tab/><text:tab/>Area<text:line-break/><text:tab/><text:tab/><text:tab/><text:tab/>Zone<text:line-break/><text:tab/><text:tab/><text:tab/><text:tab/>Bill Collector<text:line-break/><text:tab/><text:tab/><text:tab/><text:tab/>POP/Distribution point<text:line-break/><text:tab/><text:tab/><text:tab/><text:tab/>Customer Statuses<text:line-break/><text:tab/><text:tab/><text:tab/><text:tab/>Active<text:line-break/><text:tab/><text:tab/><text:tab/><text:tab/>Due Warning<text:line-break/><text:tab/><text:tab/><text:tab/><text:tab/>Grace Period<text:line-break/><text:tab/><text:tab/><text:tab/><text:tab/>Suspended<text:line-break/><text:tab/><text:tab/><text:tab/><text:tab/>Temporary Disconnect<text:line-break/><text:tab/><text:tab/><text:tab/><text:tab/>Left Customer<text:line-break/><text:tab/><text:tab/><text:tab/><text:tab/>Dead Connection<text:line-break/><text:tab/><text:tab/><text:tab/><text:tab/>Migrated<text:line-break/><text:tab/><text:tab/>Customer Notes:<text:line-break/><text:tab/><text:tab/><text:tab/>Internal notes:<text:line-break/><text:line-break/><text:tab/><text:tab/><text:tab/>payment behavior<text:line-break/><text:tab/><text:tab/><text:tab/>technical issues<text:line-break/><text:tab/><text:tab/><text:tab/>special discounts<text:line-break/><text:tab/><text:tab/><text:tab/>collector remarks<text:line-break/><text:soft-page-break/><text:tab/><text:span text:style-name="T2">MODULE 2 — MikroTik Integration:</text:span><text:line-break/><text:tab/><text:tab/>Integration Method:<text:line-break/><text:tab/><text:tab/><text:tab/>MikroTik API<text:line-break/><text:tab/><text:tab/><text:tab/>Scheduled synchronization<text:line-break/><text:tab/><text:tab/><text:tab/>Queue-based sync engine<text:line-break/><text:tab/><text:tab/>Synced Data:<text:line-break/><text:tab/><text:tab/><text:tab/>Customer Network Data<text:line-break/><text:tab/><text:tab/><text:tab/>PPPoE username<text:line-break/><text:tab/><text:tab/><text:tab/>profile/package<text:line-break/><text:tab/><text:tab/><text:tab/>IP address<text:line-break/><text:tab/><text:tab/><text:tab/>MAC address<text:line-break/><text:tab/><text:tab/><text:tab/>online status<text:line-break/><text:tab/><text:tab/><text:tab/>uptime<text:line-break/><text:tab/><text:tab/><text:tab/>router/POP<text:line-break/><text:tab/><text:tab/><text:tab/>bandwidth profile<text:line-break/><text:tab/><text:tab/><text:tab/>Package Synchronization<text:line-break/><text:line-break/><text:tab/><text:tab/>Packages imported automatically.<text:line-break/><text:tab/><text:tab/><text:tab/>Example:<text:line-break/><text:tab/><text:tab/><text:tab/><text:tab/>MikroTik Package<text:tab/>ERP Bill<text:line-break/><text:tab/><text:tab/><text:tab/><text:tab/>10Mbps<text:tab/><text:tab/>800<text:line-break/><text:tab/><text:tab/><text:tab/><text:tab/>20Mbps<text:tab/><text:tab/>1200<text:line-break/><text:tab/><text:tab/>Sync Frequency:<text:line-break/><text:tab/><text:tab/><text:tab/>Configurable:<text:line-break/><text:tab/><text:tab/><text:tab/><text:tab/>manual<text:line-break/><text:tab/><text:tab/><text:tab/><text:tab/>hourly<text:line-break/><text:tab/><text:tab/><text:tab/><text:tab/>daily<text:line-break/><text:tab/><text:tab/>Sync Logs:<text:line-break/><text:tab/><text:tab/><text:tab/>Track:<text:line-break/><text:tab/><text:tab/><text:tab/><text:tab/>successful syncs<text:line-break/><text:tab/><text:tab/><text:tab/><text:tab/>failed syncs<text:line-break/><text:tab/><text:tab/><text:tab/><text:tab/>missing customers<text:line-break/><text:tab/><text:tab/><text:tab/><text:tab/>duplicate usernames<text:line-break/><text:tab/><text:span text:style-name="T2">MODULE 3 — Billing System:</text:span><text:line-break/><text:tab/><text:tab/>Billing Engine:<text:line-break/><text:tab/><text:tab/><text:tab/>Bill Generation:<text:line-break/><text:tab/><text:tab/><text:tab/><text:tab/>Support:<text:line-break/><text:tab/><text:tab/><text:tab/><text:tab/>monthly recurring bills<text:line-break/><text:tab/><text:tab/><text:tab/><text:tab/>prorated bills<text:line-break/><text:tab/><text:tab/><text:tab/><text:tab/>custom bills<text:line-break/><text:tab/><text:tab/><text:tab/><text:tab/>one-time charges<text:line-break/><text:tab/><text:tab/><text:tab/><text:tab/>Bill Components<text:line-break/><text:tab/><text:tab/><text:tab/><text:tab/>internet package<text:line-break/><text:tab/><text:tab/><text:tab/><text:tab/>installation fee<text:line-break/><text:tab/><text:tab/><text:tab/><text:tab/>ONU/router installment<text:line-break/><text:tab/><text:tab/><text:tab/><text:tab/>maintenance charge<text:line-break/><text:tab/><text:tab/><text:tab/><text:tab/>VAT/tax<text:line-break/><text:tab/><text:tab/><text:tab/><text:tab/>discounts<text:line-break/><text:tab/><text:tab/><text:tab/><text:tab/>penalties<text:line-break/><text:soft-page-break/><text:tab/><text:tab/><text:tab/><text:tab/>waivers<text:line-break/><text:tab/><text:tab/>Billing Cycles:<text:line-break/><text:tab/><text:tab/><text:tab/>Support:<text:line-break/><text:tab/><text:tab/><text:tab/><text:tab/>monthly<text:line-break/><text:tab/><text:tab/><text:tab/><text:tab/>custom billing dates<text:line-break/><text:tab/><text:tab/><text:tab/><text:tab/>anniversary billing<text:line-break/><text:tab/><text:tab/>Custom Billing:<text:line-break/><text:tab/><text:tab/><text:tab/>Allow:<text:line-break/><text:tab/><text:tab/><text:tab/><text:tab/>customer-specific prices<text:line-break/><text:tab/><text:tab/><text:tab/><text:tab/>temporary discounts<text:line-break/><text:tab/><text:tab/><text:tab/><text:tab/>promotional pricing<text:line-break/><text:tab/><text:tab/><text:tab/><text:tab/>Due Management<text:line-break/><text:tab/><text:tab/><text:tab/>Features:<text:line-break/><text:tab/><text:tab/><text:tab/><text:tab/>due aging<text:line-break/><text:tab/><text:tab/><text:tab/><text:tab/>overdue tracking<text:line-break/><text:tab/><text:tab/><text:tab/><text:tab/>grace period<text:line-break/><text:tab/><text:tab/><text:tab/><text:tab/>warning levels<text:line-break/><text:tab/><text:tab/>Advance Balance:<text:line-break/><text:tab/><text:tab/><text:tab/>Support:<text:line-break/><text:tab/><text:tab/><text:tab/><text:tab/>prepaid balance<text:line-break/><text:tab/><text:tab/><text:tab/><text:tab/>credit adjustments<text:line-break/><text:tab/><text:tab/><text:tab/><text:tab/>overpayments<text:line-break/><text:tab/><text:span text:style-name="T2">MODULE 4 — Collection Management:</text:span><text:line-break/><text:tab/><text:tab/>Collector Assignment:<text:line-break/><text:tab/><text:tab/><text:tab/>Assign collectors by:<text:line-break/><text:tab/><text:tab/><text:tab/><text:tab/>area<text:line-break/><text:tab/><text:tab/><text:tab/><text:tab/>customer group<text:line-break/><text:tab/><text:tab/><text:tab/><text:tab/>Collection Entry<text:line-break/><text:tab/><text:tab/>Collectors can:<text:line-break/><text:tab/><text:tab/><text:tab/>mark payment received<text:line-break/><text:tab/><text:tab/><text:tab/>enter amount<text:line-break/><text:tab/><text:tab/><text:tab/>add remarks<text:line-break/><text:tab/><text:tab/><text:tab/>upload proof<text:line-break/><text:tab/><text:tab/>Collector Cashbook:<text:line-break/><text:tab/><text:tab/><text:tab/>Track:<text:line-break/><text:tab/><text:tab/><text:tab/><text:tab/>total assigned<text:line-break/><text:tab/><text:tab/><text:tab/><text:tab/>total collected<text:line-break/><text:tab/><text:tab/><text:tab/><text:tab/>submitted amount<text:line-break/><text:tab/><text:tab/><text:tab/><text:tab/>pending cash<text:line-break/><text:tab/><text:tab/><text:tab/><text:tab/>shortages<text:line-break/><text:tab/><text:tab/><text:tab/><text:tab/>excess cash<text:line-break/><text:tab/><text:tab/>Reconciliation System:<text:line-break/><text:tab/><text:tab/><text:tab/>Finance admin can:<text:line-break/><text:tab/><text:tab/><text:tab/><text:tab/>verify submissions<text:line-break/><text:tab/><text:tab/><text:tab/><text:tab/>approve collections<text:line-break/><text:tab/><text:tab/><text:tab/><text:tab/>flag discrepancies<text:line-break/><text:tab/><text:tab/>Collector Performance Metrics:<text:line-break/><text:tab/><text:tab/><text:tab/>collection rate<text:line-break/><text:tab/><text:tab/><text:tab/>overdue recovery<text:line-break/><text:soft-page-break/><text:tab/><text:tab/><text:tab/>monthly performance<text:line-break/><text:tab/><text:tab/><text:tab/>cash handling accuracy<text:line-break/><text:tab/><text:span text:style-name="T2">MODULE 5 — Accounting &amp; Finance:</text:span><text:line-break/><text:tab/><text:tab/>Accounting Structure:<text:line-break/><text:tab/><text:tab/><text:tab/>Ledger-Based System:<text:line-break/><text:tab/><text:tab/><text:tab/><text:tab/>Every transaction creates accounting entries.<text:line-break/><text:tab/><text:tab/><text:tab/><text:tab/>Core Ledgers<text:line-break/><text:tab/><text:tab/><text:tab/><text:tab/>Cas<text:span text:style-name="T3">h</text:span><text:line-break/><text:tab/><text:tab/><text:tab/><text:tab/>Bank<text:line-break/><text:tab/><text:tab/><text:tab/><text:tab/>Accounts Receivable<text:line-break/><text:tab/><text:tab/><text:tab/><text:tab/>Expenses<text:line-break/><text:tab/><text:tab/><text:tab/><text:tab/>Salary<text:line-break/><text:tab/><text:tab/><text:tab/><text:tab/>Assets<text:line-break/><text:tab/><text:tab/><text:tab/><text:tab/>Vendor Payables<text:line-break/><text:tab/><text:tab/><text:tab/><text:tab/>Financial Operations<text:line-break/><text:tab/><text:tab/><text:tab/>Support:<text:line-break/><text:tab/><text:tab/><text:tab/><text:tab/>income entries<text:line-break/><text:tab/><text:tab/><text:tab/><text:tab/>expense entries<text:line-break/><text:tab/><text:tab/><text:tab/><text:tab/>transfers<text:line-break/><text:tab/><text:tab/><text:tab/><text:tab/>adjustments<text:line-break/><text:tab/><text:tab/>Expense Categories:<text:line-break/><text:tab/><text:tab/><text:tab/>bandwidth purchase<text:line-break/><text:tab/><text:tab/><text:tab/>electricity<text:line-break/><text:tab/><text:tab/><text:tab/>salaries<text:line-break/><text:tab/><text:tab/><text:tab/>transport<text:line-break/><text:tab/><text:tab/><text:tab/>maintenance<text:line-break/><text:tab/><text:tab/><text:tab/>fuel<text:line-break/><text:tab/><text:tab/><text:tab/>equipment purchase<text:line-break/><text:tab/><text:tab/><text:tab/>office rent<text:line-break/><text:tab/><text:tab/>Financial Reports:<text:line-break/><text:tab/><text:tab/><text:tab/>Generate:<text:line-break/><text:tab/><text:tab/><text:tab/><text:tab/>profit/loss<text:line-break/><text:tab/><text:tab/><text:tab/><text:tab/>cash flow<text:line-break/><text:tab/><text:tab/><text:tab/><text:tab/>expense breakdown<text:line-break/><text:tab/><text:tab/><text:tab/><text:tab/>area profitability<text:line-break/><text:tab/><text:tab/><text:tab/><text:tab/>collector performance<text:line-break/><text:tab/><text:tab/><text:tab/><text:tab/>due analysis<text:line-break/><text:tab/><text:span text:style-name="T2">MODULE 6 — Salary &amp; HR:</text:span><text:line-break/><text:tab/><text:tab/>Employee Management:<text:line-break/><text:tab/><text:tab/><text:tab/>Store:<text:line-break/><text:tab/><text:tab/><text:tab/><text:tab/>employee profiles<text:line-break/><text:tab/><text:tab/><text:tab/><text:tab/>department<text:line-break/><text:tab/><text:tab/><text:tab/><text:tab/>salary structure<text:line-break/><text:tab/><text:tab/><text:tab/><text:tab/>joining date<text:line-break/><text:tab/><text:tab/><text:tab/><text:tab/>status<text:line-break/><text:tab/><text:tab/><text:tab/><text:tab/>Payroll<text:line-break/><text:tab/><text:tab/><text:tab/>Features:<text:line-break/><text:tab/><text:tab/><text:tab/><text:tab/>monthly payroll<text:line-break/><text:tab/><text:tab/><text:tab/><text:tab/>bonuses<text:line-break/><text:soft-page-break/><text:tab/><text:tab/><text:tab/><text:tab/>deductions<text:line-break/><text:tab/><text:tab/><text:tab/><text:tab/>advances<text:line-break/><text:tab/><text:tab/><text:tab/><text:tab/>incentives<text:line-break/><text:tab/><text:tab/><text:tab/><text:tab/>commissions<text:line-break/><text:tab/><text:tab/>Attendance:<text:line-break/><text:tab/><text:tab/><text:tab/>Track:<text:line-break/><text:tab/><text:tab/><text:tab/><text:tab/>present/absent<text:line-break/><text:tab/><text:tab/><text:tab/><text:tab/>late<text:line-break/><text:tab/><text:tab/><text:tab/><text:tab/>field activity<text:line-break/><text:tab/><text:tab/><text:tab/><text:tab/>Collector Incentives<text:line-break/><text:tab/><text:tab/>Support:<text:line-break/><text:tab/><text:tab/><text:tab/>percentage-based commission<text:line-break/><text:tab/><text:tab/><text:tab/>fixed incentive<text:line-break/><text:tab/><text:tab/><text:tab/>target bonuses<text:line-break/><text:tab/><text:span text:style-name="T2">MODULE 7 — Complaint &amp; Ticket Management:</text:span><text:line-break/><text:tab/><text:tab/>Complaint Registration:<text:line-break/><text:tab/><text:tab/><text:tab/>Customers can have:<text:line-break/><text:tab/><text:tab/><text:tab/><text:tab/>technical complaints<text:line-break/><text:tab/><text:tab/><text:tab/><text:tab/>billing complaints<text:line-break/><text:tab/><text:tab/><text:tab/><text:tab/>service requests<text:line-break/><text:tab/><text:tab/>Ticket Workflow:<text:line-break/><text:tab/><text:tab/><text:tab/>Statuses:<text:line-break/><text:tab/><text:tab/><text:tab/><text:tab/>Open<text:line-break/><text:tab/><text:tab/><text:tab/><text:tab/>Assigned<text:line-break/><text:tab/><text:tab/><text:tab/><text:tab/>In Progress<text:line-break/><text:tab/><text:tab/><text:tab/><text:tab/>Resolved<text:line-break/><text:tab/><text:tab/><text:tab/><text:tab/>Closed<text:line-break/><text:tab/><text:tab/>Technician Assignment:<text:line-break/><text:tab/><text:tab/><text:tab/>Assign tickets based on:<text:line-break/><text:tab/><text:tab/><text:tab/><text:tab/>area<text:line-break/><text:tab/><text:tab/><text:tab/><text:tab/>workload<text:line-break/><text:tab/><text:tab/><text:tab/><text:tab/>expertise<text:line-break/><text:tab/><text:tab/>Ticket Analytics:<text:line-break/><text:tab/><text:tab/><text:tab/>Track:<text:line-break/><text:tab/><text:tab/><text:tab/><text:tab/>resolution time<text:line-break/><text:tab/><text:tab/><text:tab/><text:tab/>repeated issues<text:line-break/><text:tab/><text:tab/><text:tab/><text:tab/>area outage frequency<text:line-break/><text:tab/><text:span text:style-name="T2">MODULE 8 — Inventory &amp; Asset Management:</text:span><text:line-break/><text:tab/><text:tab/>Asset Tracking:<text:line-break/><text:tab/><text:tab/><text:tab/>Track:<text:line-break/><text:tab/><text:tab/><text:tab/><text:tab/>routers<text:line-break/><text:tab/><text:tab/><text:tab/><text:tab/>switches<text:line-break/><text:tab/><text:tab/><text:tab/><text:tab/>ONU devices<text:line-break/><text:tab/><text:tab/><text:tab/><text:tab/>cables<text:line-break/><text:tab/><text:tab/><text:tab/><text:tab/>splice boxes<text:line-break/><text:tab/><text:tab/><text:tab/><text:tab/>backup batteries<text:line-break/><text:tab/><text:tab/>Inventory Operations:<text:line-break/><text:tab/><text:tab/><text:tab/>Support:<text:line-break/><text:tab/><text:tab/><text:tab/><text:tab/>stock in/out<text:line-break/><text:soft-page-break/><text:tab/><text:tab/><text:tab/><text:tab/>supplier tracking<text:line-break/><text:tab/><text:tab/><text:tab/><text:tab/>damaged items<text:line-break/><text:tab/><text:tab/><text:tab/><text:tab/>repair records<text:line-break/><text:tab/><text:tab/>Asset Assignment:<text:line-break/><text:tab/><text:tab/><text:tab/>Assign devices to:<text:line-break/><text:tab/><text:tab/><text:tab/><text:tab/>customers<text:line-break/><text:tab/><text:tab/><text:tab/><text:tab/>technicians<text:line-break/><text:tab/><text:tab/><text:tab/><text:tab/>POPs<text:line-break/><text:tab/><text:span text:style-name="T2">MODULE 9 — Notifications:</text:span><text:line-break/><text:tab/><text:tab/>Notification Channels:<text:line-break/><text:tab/><text:tab/><text:tab/>SMS<text:line-break/><text:tab/><text:tab/><text:tab/>WhatsApp<text:line-break/><text:tab/><text:tab/><text:tab/>Email<text:line-break/><text:tab/><text:tab/>Notification Types:<text:line-break/><text:tab/><text:tab/><text:tab/>due reminders<text:line-break/><text:tab/><text:tab/><text:tab/>payment confirmation<text:line-break/><text:tab/><text:tab/><text:tab/>overdue warnings<text:line-break/><text:tab/><text:tab/><text:tab/>complaint updates<text:line-break/><text:tab/><text:tab/><text:tab/>salary notifications<text:line-break/><text:tab/><text:span text:style-name="T2">MODULE 10 — Dashboard &amp; Analytics:</text:span><text:line-break/><text:tab/><text:tab/>Executive Dashboard:<text:line-break/><text:tab/><text:tab/><text:tab/>KPIs:<text:line-break/><text:tab/><text:tab/><text:tab/><text:tab/>total revenue<text:line-break/><text:tab/><text:tab/><text:tab/><text:tab/>monthly profit<text:line-break/><text:tab/><text:tab/><text:tab/><text:tab/>collection rate<text:line-break/><text:tab/><text:tab/><text:tab/><text:tab/>active customers<text:line-break/><text:tab/><text:tab/><text:tab/><text:tab/>churn rate<text:line-break/><text:tab/><text:tab/><text:tab/><text:tab/>overdue amount<text:line-break/><text:tab/><text:tab/>Finance Dashboard:<text:line-break/><text:tab/><text:tab/><text:tab/>Metrics:<text:line-break/><text:tab/><text:tab/><text:tab/><text:tab/>cash flow<text:line-break/><text:tab/><text:tab/><text:tab/><text:tab/>expense ratio<text:line-break/><text:tab/><text:tab/><text:tab/><text:tab/>salary expenses<text:line-break/><text:tab/><text:tab/><text:tab/><text:tab/>due trends<text:line-break/><text:tab/><text:tab/><text:tab/><text:tab/>profit by area<text:line-break/><text:tab/><text:tab/>Operational Dashboard:<text:line-break/><text:tab/><text:tab/><text:tab/>Metrics:<text:line-break/><text:tab/><text:tab/><text:tab/><text:tab/>online customers<text:line-break/><text:tab/><text:tab/><text:tab/><text:tab/>offline customers<text:line-break/><text:tab/><text:tab/><text:tab/><text:tab/>active complaints<text:line-break/><text:tab/><text:tab/><text:tab/><text:tab/>technician activity<text:line-break/><text:tab/><text:tab/><text:tab/><text:tab/>collector activity<text:line-break/><text:tab/><text:tab/>Area Analytics:<text:line-break/><text:tab/><text:tab/><text:tab/>Reports:<text:line-break/><text:tab/><text:tab/><text:tab/><text:tab/>revenue by area<text:line-break/><text:tab/><text:tab/><text:tab/><text:tab/>customer density<text:line-break/><text:tab/><text:tab/><text:tab/><text:tab/>complaint frequency<text:line-break/><text:tab/><text:tab/><text:tab/><text:tab/>collection efficiency<text:line-break/><text:tab/><text:tab/>Forecasting &amp; Intelligence:<text:line-break/><text:soft-page-break/><text:tab/><text:tab/><text:tab/>Predictive Analytics:<text:line-break/><text:tab/><text:tab/><text:tab/><text:tab/>predicted due risk<text:line-break/><text:tab/><text:tab/><text:tab/><text:tab/>churn probability<text:line-break/><text:tab/><text:tab/><text:tab/><text:tab/>collection forecasting<text:line-break/><text:tab/><text:tab/><text:tab/><text:tab/>revenue trends<text:line-break/><text:tab/><text:span text:style-name="T2">MODULE 11 — Revenue Leakage Detection:</text:span><text:line-break/><text:tab/><text:tab/>Detection Rules:<text:line-break/><text:tab/><text:tab/><text:tab/>Identify:<text:line-break/><text:tab/><text:tab/><text:tab/><text:tab/>active MikroTik users without billing<text:line-break/><text:tab/><text:tab/><text:tab/><text:tab/>billed users not active in MikroTik<text:line-break/><text:tab/><text:tab/><text:tab/><text:tab/>duplicate billing<text:line-break/><text:tab/><text:tab/><text:tab/><text:tab/>unassigned collections<text:line-break/><text:tab/><text:tab/><text:tab/><text:tab/>collector discrepancies<text:line-break/><text:tab/><text:span text:style-name="T2">MODULE 12 — Audit &amp; Security:</text:span><text:line-break/><text:tab/><text:tab/>Audit Logs:<text:line-break/><text:tab/><text:tab/><text:tab/>Track:<text:line-break/><text:tab/><text:tab/><text:tab/><text:tab/>bill changes<text:line-break/><text:tab/><text:tab/><text:tab/><text:tab/>payment edits<text:line-break/><text:tab/><text:tab/><text:tab/><text:tab/>deletions<text:line-break/><text:tab/><text:tab/><text:tab/><text:tab/>collector submissions<text:line-break/><text:tab/><text:tab/><text:tab/><text:tab/>salary edits<text:line-break/><text:tab/><text:tab/>Login Security:<text:line-break/><text:tab/><text:tab/><text:tab/>Features:<text:line-break/><text:tab/><text:tab/><text:tab/><text:tab/>2FA<text:line-break/><text:tab/><text:tab/><text:tab/><text:tab/>IP logging<text:line-break/><text:tab/><text:tab/><text:tab/><text:tab/>session management<text:line-break/><text:tab/><text:tab/><text:tab/><text:tab/>device tracking<text:line-break/><text:tab/><text:tab/><text:tab/><text:tab/>Permission System<text:line-break/><text:line-break/><text:tab/><text:tab/><text:tab/>Granular role permissions.<text:line-break/><text:span text:style-name="T4">6. </text:span><text:span text:style-name="T1">Customer Portal:</text:span><text:line-break/><text:tab/>Features:<text:line-break/><text:tab/><text:tab/>Customers can:<text:line-break/><text:tab/><text:tab/><text:tab/>view bills<text:line-break/><text:tab/><text:tab/><text:tab/>view payment history<text:line-break/><text:tab/><text:tab/><text:tab/>see package details<text:line-break/><text:tab/><text:tab/><text:tab/>submit complaints<text:line-break/><text:tab/><text:tab/><text:tab/>view due amount<text:line-break/><text:span text:style-name="T4">7. </text:span><text:span text:style-name="T1">Reports:</text:span><text:line-break/><text:tab/>Financial Reports:<text:line-break/><text:tab/><text:tab/>profit/loss<text:line-break/><text:tab/><text:tab/>reve<text:span text:style-name="T5">n</text:span>ue summary<text:line-break/><text:tab/><text:tab/>expense summary<text:line-break/><text:tab/><text:tab/>collector reports<text:line-break/><text:tab/>Customer Reports:<text:line-break/><text:tab/><text:tab/>active customers<text:line-break/><text:tab/><text:tab/>suspended customers<text:line-break/><text:tab/><text:tab/>churn reports<text:line-break/><text:soft-page-break/><text:tab/><text:tab/>package distribution<text:line-break/><text:tab/>Operational Reports:<text:line-break/><text:tab/><text:tab/>complaint reports<text:line-break/><text:tab/><text:tab/>technician reports<text:line-break/><text:tab/><text:tab/>area outage reports<text:line-break/><text:span text:style-name="T4">8. </text:span><text:span text:style-name="T1">Search &amp; Filtering:</text:span><text:line-break/><text:tab/>Global search for:<text:line-break/><text:tab/><text:tab/>customer<text:line-break/><text:tab/><text:tab/>phone<text:line-break/><text:tab/><text:tab/>username<text:line-break/><text:tab/><text:tab/>invoice<text:line-break/><text:tab/><text:tab/>collector<text:line-break/><text:tab/><text:tab/>area<text:line-break/><text:tab/>Advanced filtering on all major modules.<text:line-break/><text:span text:style-name="T4">9. </text:span><text:span text:style-name="T1">Technical Requirements:</text:span><text:line-break/><text:tab/>Backend:<text:line-break/><text:tab/><text:tab/>Recommended:<text:line-break/><text:tab/><text:tab/><text:tab/>NestJS<text:line-break/><text:tab/>Frontend:<text:line-break/><text:tab/><text:tab/>Recommended:<text:line-break/><text:tab/><text:tab/><text:tab/>Next.js<text:line-break/><text:tab/><text:tab/><text:tab/>React</text:p>
      <text:p text:style-name="P3"><text:tab/>Styling:</text:p>
      <text:p text:style-name="P4">Tailwind CSS<text:line-break/> Database:<text:line-break/> PostgreSQL<text:line-break/> Charts &amp; Visualization:<text:line-break/> Apache ECharts<text:line-break/> Recharts<text:line-break/> API Architecture:<text:line-break/> REST API<text:line-break/> Background Jobs:<text:line-break/> Use queues for:<text:line-break/> MikroTik sync<text:line-break/> notifications<text:line-break/> report generation<text:line-break/> analytics calculations<text:line-break/><text:span text:style-name="T6">10. </text:span><text:span text:style-name="T2">System Architecture:</text:span><text:line-break/> MikroTik Routers<text:line-break/> ↓<text:line-break/> Sync Service Layer<text:line-break/> ↓<text:line-break/> Central ERP Database<text:line-break/> ↓<text:line-break/> Finance Engine<text:line-break/> ↓<text:line-break/> Analytics Engine<text:line-break/> <text:s text:c="4"/><text:tab/><text:tab/> <text:s text:c="3"/>↓<text:line-break/><text:soft-page-break/><text:tab/>Admin Dashboard<text:line-break/><text:span text:style-name="T4">11. </text:span><text:span text:style-name="T1">Non-Functional Requirements:</text:span><text:line-break/><text:tab/>Performance:<text:line-break/><text:tab/><text:tab/>dashboard loads under 3 seconds<text:line-break/><text:tab/><text:tab/>support 50k+ customers<text:line-break/><text:tab/><text:tab/>scalable architecture<text:line-break/><text:tab/>Security:<text:line-break/><text:tab/><text:tab/>encrypted passwords<text:line-break/><text:tab/><text:tab/>RBAC<text:line-break/><text:tab/><text:tab/>audit logs<text:line-break/><text:tab/><text:tab/>secure APIs<text:line-break/><text:tab/>Reliability:<text:line-break/><text:tab/><text:tab/>automated backups<text:line-break/><text:tab/><text:tab/>rollback support<text:line-break/><text:tab/><text:tab/>sync retry mechanisms<text:line-break/><text:span text:style-name="T4">12. </text:span><text:span text:style-name="T1">Success Metrics:</text:span><text:line-break/><text:tab/>Operational Metrics:<text:line-break/><text:tab/><text:tab/>reduced due percentage<text:line-break/><text:tab/><text:tab/>improved collection efficiency<text:line-break/><text:tab/><text:tab/>faster complaint resolution<text:line-break/><text:tab/>Financial Metrics:<text:line-break/><text:tab/><text:tab/>accurate profit tracking<text:line-break/><text:tab/><text:tab/>reduced revenue leakage<text:line-break/><text:tab/><text:tab/>expense visibility<text:line-break/><text:tab/>System Metrics:<text:line-break/><text:tab/><text:tab/>sync accuracy<text:line-break/><text:tab/><text:tab/>dashboard usage<text:line-break/><text:tab/><text:tab/>report generation speed</text:p>
      <text:p text:style-name="P5"><text:span text:style-name="T5">13. </text:span>User Experience Goals: </text:p>
      <text:p text:style-name="P4"><text:tab/><text:tab/>The experience should feel: Smooth, Intentional, Premium, Easy to navigate, Fast and <text:tab/><text:tab/><text:tab/>distraction-free.</text:p>
      <text:p text:style-name="P4"><text:tab/><text:tab/>Avoid: Excessive animations, Clutter, Over-designed sections, Too many colors.<text:line-break/><text:span text:style-name="T4">14. </text:span><text:span text:style-name="T1">Final Product Goal:</text:span><text:line-break/><text:tab/>Build a scalable ISP operational intelligence and finance platform capable of handling:<text:line-break/><text:tab/><text:tab/>customer operations<text:line-break/><text:tab/><text:tab/>financial management<text:line-break/><text:tab/><text:tab/>field collection<text:line-break/><text:tab/><text:tab/>accounting<text:line-break/><text:tab/><text:tab/>staff management<text:line-break/><text:tab/><text:tab/>operational analytics<text:line-break/><text:tab/></text:p>
      <text:p text:style-name="P3"><text:line-break/><text:tab/>within a single centralized system while integrating safely with MikroTik infrastructu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00:52:53.669311900</meta:creation-date>
    <dc:date>2026-05-27T01:45:29.668048500</dc:date>
    <meta:editing-duration>PT4M49S</meta:editing-duration>
    <meta:editing-cycles>1</meta:editing-cycles>
    <meta:document-statistic meta:table-count="0" meta:image-count="0" meta:object-count="0" meta:page-count="11" meta:paragraph-count="8" meta:word-count="1091" meta:character-count="10327" meta:non-whitespace-character-count="7731"/>
    <meta:generator>LibreOffice/26.2.3.2$Windows_X86_64 LibreOffice_project/70e089b17412e4cb7773e41413306b17a2328c34</meta:generator>
  </office:meta>
</office:document-meta>
</file>